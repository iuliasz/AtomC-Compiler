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Aplicația 1.1:</text:span><text:span text:style-name="T3"><text:s/>Într-un text există date calendaristice de forma „zi/luna/an”, în care ziua și luna sunt formate din 1-2 cifre iar anul din 2 sau 4 cifre. Să se scrie o expresie regulată care găsește toate aceste date. Nu este necesar să se facă validarea datelor calendaristice. Ex: Ion s-a născut pe data de 21/5/1990 și Maria pe data de 7/12/92.</text:span></text:p>
      <text:p text:style-name="P4"/>
      <text:p text:style-name="P5">(0?[1-9]|[12][0-9]|3[01])(\/|\.)(0?[1-9]|1[0-2])(\/|\.)([1-9][0-9]{3}|[1-9][0-9])</text:p>
      <text:p text:style-name="P6"/>
      <text:p text:style-name="Normal"><text:span text:style-name="T7">Aplicația 1.2:<text:s/></text:span><text:span text:style-name="T8">Propuneți un text în care există o secvență de caractere care corespunde expresiei regulate: [A-Z][a-zA-Z]*,[a-z]+ [0-9]+(\/.)*(\.|\?)</text:span></text:p>
      <text:p text:style-name="P9"/>
      <text:p text:style-name="P10"/>
      <text:p text:style-name="Normal"><text:span text:style-name="T11">Aplicația 1.3</text:span><text:span text:style-name="T12">: Să se scrie o expresie regulată care testează o sintaxă simplificată pentru clasele de caractere. Acestea trebuie să înceapă cu „[” și să se termine cu „]”; opțional după „[” poate fi „^”; în interior pot fi caractere individuale sau intervale de caractere; un caracter poate fi simplu sau prefixat de „\”. Exemple valide: [abc] [^0-9] [\r\n\t ] [., !?;\-] [\\] Exemple invalide (nu trebuie recunoscute): [\] [\\\] [a</text:span></text:p>
      <text:p text:style-name="P13"/>
      <text:p text:style-name="Normal"><text:span text:style-name="T14">^\[\^?(\\.|[^\]\\[-]|(\\.|[^\]\\[-])-(\\.|[^\]\\[-]))+\]$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Malgun Gothic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Malgun Gothic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algun Gothic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algun Gothic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algun Gothic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algun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algun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algun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algun Gothic" style:font-name-complex="Times New Roman" fo:color="#272727" fo:hyphenate="false"/>
    </style:style>
    <style:style style:name="Normal" style:display-name="Normal" style:family="paragraph">
      <style:text-properties fo:language="ro" fo:country="RO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Malgun Gothic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Malgun Gothic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algun Gothic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Malgun Gothic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algun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algun Gothic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Malgun Gothic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Malgun Gothic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Malgun Gothic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Malgun Gothic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ulia Szenteș</meta:initial-creator>
    <dc:creator>Iulia Szenteș</dc:creator>
    <meta:creation-date>2026-03-16T16:38:00Z</meta:creation-date>
    <dc:date>2026-03-16T17:46:00Z</dc:date>
    <meta:template xlink:href="Normal" xlink:type="simple"/>
    <meta:editing-cycles>9</meta:editing-cycles>
    <meta:editing-duration>PT4080S</meta:editing-duration>
    <meta:document-statistic meta:page-count="1" meta:paragraph-count="2" meta:word-count="160" meta:character-count="1074" meta:row-count="7" meta:non-whitespace-character-count="916"/>
  </office:meta>
</office:document-meta>
</file>