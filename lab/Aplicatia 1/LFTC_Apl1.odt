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Aplicația 1.1:</text:span><text:span text:style-name="T3"><text:s/>Într-un text există date calendaristice de forma „zi/luna/an”, în care ziua și luna sunt formate din 1-2 cifre iar anul din 2 sau 4 cifre. Să se scrie o expresie regulată care găsește toate aceste date. Nu este necesar să se facă validarea datelor calendaristice. Ex: Ion s-a născut pe data de 21/5/1990 și Maria pe data de 7/12/92.</text:span></text:p>
      <text:p text:style-name="Normal"/>
      <text:p text:style-name="P4">(0?[1-9]|[12][0-9]|3[01])(\/|\.)(0?[1-9]|1[0-2])(\/|\.)([0-9]{4}|[0-9]{2})</text:p>
      <text:p text:style-name="P5"/>
      <text:p text:style-name="Normal"><text:span text:style-name="T6">Aplicația 1.2:<text:s/></text:span><text:span text:style-name="T7">Propuneți un text în care există o secvență de caractere care corespunde expresiei regulate: [A-Z][a-zA-Z]*,[a-z]+ [0-9]+(\/.)*(\.|\?)</text:span></text:p>
      <text:p text:style-name="P8"/>
      <text:p text:style-name="P9"/>
      <text:p text:style-name="Normal"><text:span text:style-name="T10">Aplicația 1.3</text:span><text:span text:style-name="T11">: Să se scrie o expresie regulată care testează o sintaxă simplificată pentru clasele de caractere. Acestea trebuie să înceapă cu „[” și să se termine cu „]”; opțional după „[” poate fi „^”; în interior pot fi caractere individuale sau intervale de caractere; un caracter poate fi simplu sau prefixat de „\”. Exemple valide: [abc] [^0-9] [\r\n\t ] [., !?;\-] [\\] Exemple invalide (nu trebuie recunoscute): [\] [\\\] [a</text:span></text:p>
      <text:p text:style-name="P12"/>
      <text:p text:style-name="P13">^\[\^?(\\[rnt \\]|[^\\\]])+\]$</text:p>
      <text:p text:style-name="P14"/>
      <text:p text:style-name="P15"/>
      <text:p text:style-name="P16"/>
      <text:p text:style-name="P17"/>
      <text:p text:style-name="P18"/>
      <text:p text:style-name="P19"/>
      <text:p text:style-name="Normal"><text:span text:style-name="T20">^\[\^?(\\.|[^\]\\\[-]|(\\.|[^\]\\\[-])-(\\.|[^\]\\\[-]))+\]$</text:span></text:p>
      <text:p text:style-name="P21"/>
      <text:p text:style-name="P22"/>
      <text:p text:style-name="P23"/>
      <text:p text:style-name="P24"/>
      <text:p text:style-name="P25"/>
      <text:p text:style-name="P26">^(\[)(\^?)((\\[rnt \\])|([^\]\\-])|([^\]\\-]-[^\]\\-]))+(\])$</text:p>
      <text:p text:style-name="P27"/>
      <text:p text:style-name="P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language="ro" fo:country="RO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Malgun Gothic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Malgun Gothic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ulia Szenteș</meta:initial-creator>
    <dc:creator>Iulia Szenteș</dc:creator>
    <meta:creation-date>2026-03-16T16:38:00Z</meta:creation-date>
    <dc:date>2026-03-17T13:33:00Z</dc:date>
    <meta:template xlink:href="Normal" xlink:type="simple"/>
    <meta:editing-cycles>17</meta:editing-cycles>
    <meta:editing-duration>PT9540S</meta:editing-duration>
    <meta:document-statistic meta:page-count="2" meta:paragraph-count="2" meta:word-count="175" meta:character-count="1177" meta:row-count="8" meta:non-whitespace-character-count="1004"/>
  </office:meta>
</office:document-meta>
</file>